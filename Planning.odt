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5pt solid #000000"/>
    </style:style>
    <style:style style:name="Tabela1.A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1692f2" officeooo:paragraph-rsid="001692f2"/>
    </style:style>
    <style:style style:name="P2" style:family="paragraph" style:parent-style-name="Text_20_body">
      <style:text-properties officeooo:paragraph-rsid="001692f2"/>
    </style:style>
    <style:style style:name="P3" style:family="paragraph" style:parent-style-name="Text_20_body">
      <style:text-properties fo:font-weight="bold" officeooo:rsid="001692f2" officeooo:paragraph-rsid="001692f2" style:font-weight-asian="bold" style:font-weight-complex="bold"/>
    </style:style>
    <style:style style:name="P4" style:family="paragraph" style:parent-style-name="Text_20_body">
      <style:text-properties officeooo:rsid="001692f2" officeooo:paragraph-rsid="001692f2"/>
    </style:style>
    <style:style style:name="P5" style:family="paragraph" style:parent-style-name="Text_20_body" style:list-style-name="L1">
      <style:text-properties officeooo:rsid="001692f2" officeooo:paragraph-rsid="001692f2"/>
    </style:style>
    <style:style style:name="P6" style:family="paragraph" style:parent-style-name="Text_20_body">
      <style:text-properties officeooo:rsid="001737f3" officeooo:paragraph-rsid="001737f3"/>
    </style:style>
    <style:style style:name="P7" style:family="paragraph" style:parent-style-name="Text_20_body">
      <style:text-properties officeooo:rsid="00188128" officeooo:paragraph-rsid="00188128"/>
    </style:style>
    <style:style style:name="P8" style:family="paragraph" style:parent-style-name="Text_20_body">
      <style:text-properties officeooo:rsid="001692f2" officeooo:paragraph-rsid="00188128"/>
    </style:style>
    <style:style style:name="P9" style:family="paragraph" style:parent-style-name="Text_20_body" style:list-style-name="List_20_1">
      <style:text-properties officeooo:paragraph-rsid="0018de7b"/>
    </style:style>
    <style:style style:name="P10" style:family="paragraph" style:parent-style-name="Text_20_body" style:list-style-name="List_20_1">
      <style:text-properties fo:font-weight="normal" officeooo:rsid="0018de7b" officeooo:paragraph-rsid="0018de7b" style:font-weight-asian="normal" style:font-weight-complex="normal"/>
    </style:style>
    <style:style style:name="P11" style:family="paragraph" style:parent-style-name="Text_20_body">
      <style:text-properties fo:font-weight="normal" officeooo:rsid="0018de7b" officeooo:paragraph-rsid="0018de7b" style:font-weight-asian="normal" style:font-weight-complex="normal"/>
    </style:style>
    <style:style style:name="P12" style:family="paragraph" style:parent-style-name="Text_20_body">
      <style:text-properties officeooo:rsid="00188128" officeooo:paragraph-rsid="0018de7b"/>
    </style:style>
    <style:style style:name="P13" style:family="paragraph" style:parent-style-name="Text_20_body">
      <style:text-properties officeooo:rsid="0018de7b" officeooo:paragraph-rsid="0018de7b"/>
    </style:style>
    <style:style style:name="P14" style:family="paragraph" style:parent-style-name="Text_20_body">
      <style:text-properties officeooo:rsid="001a656a" officeooo:paragraph-rsid="001a656a"/>
    </style:style>
    <style:style style:name="P15" style:family="paragraph" style:parent-style-name="Text_20_body" style:list-style-name="List_20_1">
      <style:text-properties officeooo:paragraph-rsid="001a656a"/>
    </style:style>
    <style:style style:name="P16" style:family="paragraph" style:parent-style-name="Text_20_body">
      <style:text-properties fo:font-weight="bold" officeooo:rsid="0018de7b" officeooo:paragraph-rsid="0018de7b" style:font-weight-asian="bold" style:font-weight-complex="bold"/>
    </style:style>
    <style:style style:name="P17" style:family="paragraph" style:parent-style-name="Text_20_body">
      <style:text-properties fo:font-weight="normal" officeooo:rsid="0018de7b" officeooo:paragraph-rsid="001a656a" style:font-weight-asian="normal" style:font-weight-complex="normal"/>
    </style:style>
    <style:style style:name="P18" style:family="paragraph" style:parent-style-name="Text_20_body">
      <style:text-properties fo:font-weight="bold" officeooo:rsid="001a656a" officeooo:paragraph-rsid="001a656a" style:font-weight-asian="bold" style:font-weight-complex="bold"/>
    </style:style>
    <style:style style:name="P19" style:family="paragraph" style:parent-style-name="Text_20_body">
      <style:text-properties fo:font-weight="normal" officeooo:rsid="001a656a" officeooo:paragraph-rsid="001a656a" style:font-weight-asian="normal" style:font-weight-complex="normal"/>
    </style:style>
    <style:style style:name="P20" style:family="paragraph" style:parent-style-name="Text_20_body" style:list-style-name="List_20_1">
      <style:text-properties fo:font-weight="bold" officeooo:rsid="001b627b" officeooo:paragraph-rsid="001b627b" style:font-weight-asian="bold" style:font-weight-complex="bold"/>
    </style:style>
    <style:style style:name="P21" style:family="paragraph" style:parent-style-name="Text_20_body" style:list-style-name="List_20_1">
      <style:text-properties fo:font-weight="normal" officeooo:rsid="001b627b" officeooo:paragraph-rsid="001b627b" style:font-weight-asian="normal" style:font-weight-complex="normal"/>
    </style:style>
    <style:style style:name="P22" style:family="paragraph" style:parent-style-name="Text_20_body">
      <style:text-properties officeooo:rsid="00188128" officeooo:paragraph-rsid="001b627b"/>
    </style:style>
    <style:style style:name="P23" style:family="paragraph" style:parent-style-name="Text_20_body">
      <style:text-properties officeooo:rsid="001b627b" officeooo:paragraph-rsid="001b627b"/>
    </style:style>
    <style:style style:name="P24" style:family="paragraph" style:parent-style-name="Text_20_body" style:list-style-name="List_20_1">
      <style:text-properties fo:font-weight="bold" officeooo:rsid="001bbb19" officeooo:paragraph-rsid="001bbb19" style:font-weight-asian="bold" style:font-weight-complex="bold"/>
    </style:style>
    <style:style style:name="P25" style:family="paragraph" style:parent-style-name="Text_20_body">
      <style:text-properties fo:font-weight="bold" officeooo:rsid="001bbb19" officeooo:paragraph-rsid="001bbb19" style:font-weight-asian="bold" style:font-weight-complex="bold"/>
    </style:style>
    <style:style style:name="P26" style:family="paragraph" style:parent-style-name="Text_20_body">
      <style:text-properties fo:font-weight="normal" officeooo:rsid="001bbb19" officeooo:paragraph-rsid="001bbb19" style:font-weight-asian="normal" style:font-weight-complex="normal"/>
    </style:style>
    <style:style style:name="P27" style:family="paragraph" style:parent-style-name="Text_20_body">
      <style:text-properties fo:font-weight="bold" officeooo:rsid="001d1547" officeooo:paragraph-rsid="001d1547" style:font-weight-asian="bold" style:font-weight-complex="bold"/>
    </style:style>
    <style:style style:name="P28" style:family="paragraph" style:parent-style-name="Text_20_body">
      <style:text-properties fo:font-weight="normal" officeooo:rsid="001d1547" officeooo:paragraph-rsid="001d1547" style:font-weight-asian="normal" style:font-weight-complex="normal"/>
    </style:style>
    <style:style style:name="P29" style:family="paragraph" style:parent-style-name="Text_20_body">
      <style:text-properties fo:font-weight="normal" officeooo:rsid="001dbf5b" officeooo:paragraph-rsid="001dbf5b" style:font-weight-asian="normal" style:font-weight-complex="normal"/>
    </style:style>
    <style:style style:name="P30" style:family="paragraph" style:parent-style-name="Text_20_body">
      <style:text-properties fo:font-weight="bold" officeooo:rsid="001f8024" officeooo:paragraph-rsid="001f8024" style:font-weight-asian="bold" style:font-weight-complex="bold"/>
    </style:style>
    <style:style style:name="P31" style:family="paragraph" style:parent-style-name="Text_20_body">
      <style:text-properties fo:font-weight="normal" officeooo:rsid="001f8024" officeooo:paragraph-rsid="001f8024" style:font-weight-asian="normal" style:font-weight-complex="normal"/>
    </style:style>
    <style:style style:name="P32" style:family="paragraph" style:parent-style-name="Heading_20_2">
      <style:text-properties fo:font-weight="bold" officeooo:rsid="001dbf5b" officeooo:paragraph-rsid="001dbf5b" style:font-weight-asian="bold" style:font-weight-complex="bold"/>
    </style:style>
    <style:style style:name="P33" style:family="paragraph" style:parent-style-name="Heading_20_3">
      <style:paragraph-properties fo:margin-top="0cm" fo:margin-bottom="0.247cm" style:contextual-spacing="false" fo:line-height="115%"/>
      <style:text-properties fo:font-weight="normal" officeooo:rsid="001dbf5b" style:font-weight-asian="normal" style:font-weight-complex="normal"/>
    </style:style>
    <style:style style:name="P34" style:family="paragraph" style:parent-style-name="Heading_20_4">
      <style:paragraph-properties fo:margin-top="0cm" fo:margin-bottom="0.247cm" style:contextual-spacing="false" fo:line-height="115%"/>
      <style:text-properties fo:font-weight="normal" officeooo:rsid="001dbf5b" style:font-weight-asian="normal" style:font-weight-complex="normal"/>
    </style:style>
    <style:style style:name="P35" style:family="paragraph" style:parent-style-name="Text_20_body" style:list-style-name="L2">
      <style:paragraph-properties fo:margin-top="0cm" fo:margin-bottom="0cm" style:contextual-spacing="false"/>
      <style:text-properties officeooo:rsid="001dbf5b"/>
    </style:style>
    <style:style style:name="P36" style:family="paragraph" style:parent-style-name="Text_20_body" style:list-style-name="L2">
      <style:text-properties officeooo:rsid="001dbf5b"/>
    </style:style>
    <style:style style:name="P37" style:family="paragraph" style:parent-style-name="Text_20_body">
      <style:text-properties officeooo:rsid="001dbf5b"/>
    </style:style>
    <style:style style:name="P38" style:family="paragraph" style:parent-style-name="Text_20_body" style:list-style-name="L3">
      <style:paragraph-properties fo:margin-top="0cm" fo:margin-bottom="0cm" style:contextual-spacing="false"/>
      <style:text-properties officeooo:rsid="001dbf5b"/>
    </style:style>
    <style:style style:name="P39" style:family="paragraph" style:parent-style-name="Text_20_body" style:list-style-name="L3">
      <style:text-properties officeooo:rsid="001dbf5b"/>
    </style:style>
    <style:style style:name="P40" style:family="paragraph" style:parent-style-name="Text_20_body" style:list-style-name="L4">
      <style:paragraph-properties fo:margin-top="0cm" fo:margin-bottom="0cm" style:contextual-spacing="false"/>
      <style:text-properties officeooo:rsid="001dbf5b"/>
    </style:style>
    <style:style style:name="P41" style:family="paragraph" style:parent-style-name="Text_20_body" style:list-style-name="L4">
      <style:text-properties officeooo:rsid="001dbf5b"/>
    </style:style>
    <style:style style:name="P42" style:family="paragraph" style:parent-style-name="Text_20_body" style:list-style-name="L5">
      <style:paragraph-properties fo:margin-top="0cm" fo:margin-bottom="0cm" style:contextual-spacing="false"/>
      <style:text-properties officeooo:rsid="001dbf5b"/>
    </style:style>
    <style:style style:name="P43" style:family="paragraph" style:parent-style-name="Text_20_body" style:list-style-name="L5">
      <style:text-properties officeooo:rsid="001dbf5b"/>
    </style:style>
    <style:style style:name="P44" style:family="paragraph" style:parent-style-name="Text_20_body" style:list-style-name="L6">
      <style:paragraph-properties fo:margin-top="0cm" fo:margin-bottom="0cm" style:contextual-spacing="false"/>
      <style:text-properties officeooo:rsid="001dbf5b"/>
    </style:style>
    <style:style style:name="P45" style:family="paragraph" style:parent-style-name="Text_20_body" style:list-style-name="L6">
      <style:text-properties officeooo:rsid="001dbf5b"/>
    </style:style>
    <style:style style:name="P46" style:family="paragraph" style:parent-style-name="Text_20_body" style:list-style-name="L7">
      <style:paragraph-properties fo:margin-top="0cm" fo:margin-bottom="0cm" style:contextual-spacing="false"/>
      <style:text-properties officeooo:rsid="001dbf5b"/>
    </style:style>
    <style:style style:name="P47" style:family="paragraph" style:parent-style-name="Text_20_body" style:list-style-name="L7">
      <style:text-properties officeooo:rsid="001dbf5b"/>
    </style:style>
    <style:style style:name="P48" style:family="paragraph" style:parent-style-name="Text_20_body" style:list-style-name="L8">
      <style:paragraph-properties fo:margin-top="0cm" fo:margin-bottom="0cm" style:contextual-spacing="false"/>
      <style:text-properties officeooo:rsid="001dbf5b"/>
    </style:style>
    <style:style style:name="P49" style:family="paragraph" style:parent-style-name="Text_20_body" style:list-style-name="L8">
      <style:text-properties officeooo:rsid="001dbf5b"/>
    </style:style>
    <style:style style:name="P50" style:family="paragraph" style:parent-style-name="Horizontal_20_Line">
      <style:paragraph-properties fo:margin-top="0cm" fo:margin-bottom="0.247cm" style:contextual-spacing="false" fo:line-height="115%"/>
      <style:text-properties officeooo:rsid="001dbf5b"/>
    </style:style>
    <style:style style:name="P51" style:family="paragraph" style:parent-style-name="Preformatted_20_Text">
      <loext:graphic-properties draw:fill="none" draw:fill-color="#ffffff"/>
      <style:paragraph-properties fo:margin-left="0cm" fo:margin-right="0cm" fo:margin-top="0cm" fo:margin-bottom="0.247cm" style:contextual-spacing="false" fo:line-height="115%" fo:text-indent="0cm" style:auto-text-indent="false" fo:background-color="transparent"/>
      <style:text-properties officeooo:rsid="001dbf5b"/>
    </style:style>
    <style:style style:name="P52" style:family="paragraph" style:parent-style-name="Preformatted_20_Text">
      <loext:graphic-properties draw:fill="none" draw:fill-color="#ffffff"/>
      <style:paragraph-properties fo:margin-top="0cm" fo:margin-bottom="0.247cm" style:contextual-spacing="false" fo:line-height="115%" fo:background-color="transparent"/>
      <style:text-properties officeooo:rsid="001dbf5b"/>
    </style:style>
    <style:style style:name="P53" style:family="paragraph" style:parent-style-name="Text_20_body" style:list-style-name="L9">
      <style:paragraph-properties fo:margin-top="0cm" fo:margin-bottom="0cm" style:contextual-spacing="false"/>
      <style:text-properties officeooo:rsid="001dbf5b"/>
    </style:style>
    <style:style style:name="P54" style:family="paragraph" style:parent-style-name="Text_20_body" style:list-style-name="L9">
      <style:text-properties officeooo:rsid="001dbf5b"/>
    </style:style>
    <style:style style:name="P55" style:family="paragraph" style:parent-style-name="Text_20_body" style:list-style-name="L10">
      <style:paragraph-properties fo:margin-top="0cm" fo:margin-bottom="0cm" style:contextual-spacing="false"/>
      <style:text-properties officeooo:rsid="001dbf5b"/>
    </style:style>
    <style:style style:name="P56" style:family="paragraph" style:parent-style-name="Text_20_body" style:list-style-name="L10">
      <style:text-properties officeooo:rsid="001dbf5b"/>
    </style:style>
    <style:style style:name="P57" style:family="paragraph" style:parent-style-name="Text_20_body" style:list-style-name="L11">
      <style:paragraph-properties fo:margin-top="0cm" fo:margin-bottom="0cm" style:contextual-spacing="false"/>
      <style:text-properties officeooo:rsid="001dbf5b"/>
    </style:style>
    <style:style style:name="P58" style:family="paragraph" style:parent-style-name="Text_20_body" style:list-style-name="L11">
      <style:text-properties officeooo:rsid="001dbf5b"/>
    </style:style>
    <style:style style:name="P59" style:family="paragraph" style:parent-style-name="Text_20_body" style:list-style-name="L12">
      <style:paragraph-properties fo:margin-top="0cm" fo:margin-bottom="0cm" style:contextual-spacing="false"/>
      <style:text-properties officeooo:rsid="001dbf5b"/>
    </style:style>
    <style:style style:name="P60" style:family="paragraph" style:parent-style-name="Text_20_body" style:list-style-name="L12">
      <style:text-properties officeooo:rsid="001dbf5b"/>
    </style:style>
    <style:style style:name="P61" style:family="paragraph" style:parent-style-name="Text_20_body" style:list-style-name="L13">
      <style:paragraph-properties fo:margin-top="0cm" fo:margin-bottom="0cm" style:contextual-spacing="false"/>
      <style:text-properties officeooo:rsid="001dbf5b"/>
    </style:style>
    <style:style style:name="P62" style:family="paragraph" style:parent-style-name="Text_20_body" style:list-style-name="L13">
      <style:text-properties officeooo:rsid="001dbf5b"/>
    </style:style>
    <style:style style:name="P63" style:family="paragraph" style:parent-style-name="Text_20_body" style:list-style-name="L14">
      <style:paragraph-properties fo:margin-top="0cm" fo:margin-bottom="0cm" style:contextual-spacing="false"/>
      <style:text-properties officeooo:rsid="001dbf5b"/>
    </style:style>
    <style:style style:name="P64" style:family="paragraph" style:parent-style-name="Text_20_body" style:list-style-name="L14">
      <style:text-properties officeooo:rsid="001dbf5b"/>
    </style:style>
    <style:style style:name="P65" style:family="paragraph" style:parent-style-name="Text_20_body" style:list-style-name="L15">
      <style:paragraph-properties fo:margin-top="0cm" fo:margin-bottom="0cm" style:contextual-spacing="false"/>
      <style:text-properties officeooo:rsid="001dbf5b"/>
    </style:style>
    <style:style style:name="P66" style:family="paragraph" style:parent-style-name="Text_20_body" style:list-style-name="L15">
      <style:text-properties officeooo:rsid="001dbf5b"/>
    </style:style>
    <style:style style:name="P67" style:family="paragraph" style:parent-style-name="Text_20_body" style:list-style-name="L16">
      <style:paragraph-properties fo:margin-top="0cm" fo:margin-bottom="0cm" style:contextual-spacing="false"/>
      <style:text-properties officeooo:rsid="001dbf5b"/>
    </style:style>
    <style:style style:name="P68" style:family="paragraph" style:parent-style-name="Text_20_body" style:list-style-name="L16">
      <style:text-properties officeooo:rsid="001dbf5b"/>
    </style:style>
    <style:style style:name="P69" style:family="paragraph" style:parent-style-name="Text_20_body" style:list-style-name="L17">
      <style:paragraph-properties fo:margin-top="0cm" fo:margin-bottom="0cm" style:contextual-spacing="false"/>
      <style:text-properties officeooo:rsid="001dbf5b"/>
    </style:style>
    <style:style style:name="P70" style:family="paragraph" style:parent-style-name="Text_20_body" style:list-style-name="L17">
      <style:text-properties officeooo:rsid="001dbf5b"/>
    </style:style>
    <style:style style:name="P71" style:family="paragraph" style:parent-style-name="Text_20_body">
      <style:text-properties fo:font-weight="bold" officeooo:rsid="00224040" officeooo:paragraph-rsid="00224040" style:font-weight-asian="bold" style:font-weight-complex="bold"/>
    </style:style>
    <style:style style:name="P72" style:family="paragraph" style:parent-style-name="Text_20_body">
      <style:text-properties fo:font-weight="normal" officeooo:rsid="001fdec6" officeooo:paragraph-rsid="001fdec6" style:font-weight-asian="normal" style:font-weight-complex="normal"/>
    </style:style>
    <style:style style:name="P73" style:family="paragraph" style:parent-style-name="Text_20_body">
      <style:text-properties fo:font-weight="normal" officeooo:rsid="002157fe" officeooo:paragraph-rsid="002157fe" style:font-weight-asian="normal" style:font-weight-complex="normal"/>
    </style:style>
    <style:style style:name="P74" style:family="paragraph" style:parent-style-name="Table_20_Contents">
      <style:text-properties fo:font-weight="bold" officeooo:rsid="00224040" officeooo:paragraph-rsid="00224040" style:font-weight-asian="bold" style:font-weight-complex="bold"/>
    </style:style>
    <style:style style:name="P75" style:family="paragraph" style:parent-style-name="Table_20_Contents">
      <style:text-properties officeooo:rsid="00224040" officeooo:paragraph-rsid="00224040"/>
    </style:style>
    <style:style style:name="P76" style:family="paragraph" style:parent-style-name="Table_20_Contents">
      <style:text-properties fo:font-weight="normal" officeooo:rsid="00224040" officeooo:paragraph-rsid="00224040" style:font-weight-asian="normal" style:font-weight-complex="normal"/>
    </style:style>
    <style:style style:name="P77" style:family="paragraph" style:parent-style-name="Table_20_Contents">
      <style:paragraph-properties style:writing-mode="lr-tb" style:writing-mode-automatic="false"/>
      <style:text-properties fo:font-weight="bold" officeooo:rsid="00224040" officeooo:paragraph-rsid="00224040" style:font-weight-asian="bold" style:font-weight-complex="bold"/>
    </style:style>
    <style:style style:name="P78" style:family="paragraph" style:parent-style-name="Table_20_Contents">
      <style:paragraph-properties style:writing-mode="lr-tb" style:writing-mode-automatic="false"/>
      <style:text-properties fo:font-weight="normal" officeooo:rsid="00224040" officeooo:paragraph-rsid="00224040" style:font-weight-asian="normal" style:font-weight-complex="normal"/>
    </style:style>
    <style:style style:name="P79" style:family="paragraph" style:parent-style-name="Table_20_Contents">
      <style:text-properties fo:font-weight="bold" officeooo:rsid="00234d3b" officeooo:paragraph-rsid="00234d3b" style:font-weight-asian="bold" style:font-weight-complex="bold"/>
    </style:style>
    <style:style style:name="P80" style:family="paragraph" style:parent-style-name="Table_20_Contents">
      <style:text-properties fo:font-weight="normal" officeooo:rsid="00234d3b" officeooo:paragraph-rsid="00234d3b" style:font-weight-asian="normal" style:font-weight-complex="normal"/>
    </style:style>
    <style:style style:name="P81" style:family="paragraph" style:parent-style-name="Table_20_Contents">
      <style:text-properties style:text-underline-style="solid" style:text-underline-width="auto" style:text-underline-color="font-color" fo:font-weight="normal" officeooo:rsid="00234d3b" officeooo:paragraph-rsid="00234d3b" style:font-weight-asian="normal" style:font-weight-complex="normal"/>
    </style:style>
    <style:style style:name="P82" style:family="paragraph" style:parent-style-name="Table_20_Contents">
      <style:text-properties officeooo:rsid="00234d3b" officeooo:paragraph-rsid="00234d3b"/>
    </style:style>
    <style:style style:name="P83" style:family="paragraph" style:parent-style-name="Table_20_Contents">
      <style:paragraph-properties fo:text-align="center" style:justify-single-word="false"/>
      <style:text-properties style:text-underline-style="solid" style:text-underline-width="auto" style:text-underline-color="font-color" fo:font-weight="bold" officeooo:rsid="00234d3b" officeooo:paragraph-rsid="00234d3b" style:font-weight-asian="bold" style:font-weight-complex="bold"/>
    </style:style>
    <style:style style:name="P84" style:family="paragraph" style:parent-style-name="Table_20_Contents">
      <style:paragraph-properties fo:text-align="center" style:justify-single-word="false"/>
      <style:text-properties style:text-underline-style="solid" style:text-underline-width="auto" style:text-underline-color="font-color" fo:font-weight="bold" officeooo:rsid="0023c8c5" officeooo:paragraph-rsid="0023c8c5" style:font-weight-asian="bold" style:font-weight-complex="bold"/>
    </style:style>
    <style:style style:name="P85" style:family="paragraph" style:parent-style-name="Table_20_Contents">
      <style:paragraph-properties fo:text-align="left" style:justify-single-word="false"/>
      <style:text-properties style:text-underline-style="none" fo:font-weight="normal" officeooo:rsid="0023c8c5" officeooo:paragraph-rsid="0023c8c5" style:font-weight-asian="normal" style:font-weight-complex="normal"/>
    </style:style>
    <style:style style:name="P86" style:family="paragraph" style:parent-style-name="Table_20_Contents">
      <style:paragraph-properties fo:text-align="left" style:justify-single-word="false"/>
      <style:text-properties style:text-underline-style="none" fo:font-weight="bold" officeooo:rsid="0023c8c5" officeooo:paragraph-rsid="0023c8c5" style:font-weight-asian="bold" style:font-weight-complex="bold"/>
    </style:style>
    <style:style style:name="T1" style:family="text">
      <style:text-properties officeooo:rsid="001737f3"/>
    </style:style>
    <style:style style:name="T2" style:family="text">
      <style:text-properties fo:font-weight="bold" style:font-weight-asian="bold" style:font-weight-complex="bold"/>
    </style:style>
    <style:style style:name="T3" style:family="text">
      <style:text-properties officeooo:rsid="00188128"/>
    </style:style>
    <style:style style:name="T4" style:family="text">
      <style:text-properties officeooo:rsid="0018de7b"/>
    </style:style>
    <style:style style:name="T5" style:family="text">
      <style:text-properties fo:font-weight="bold" officeooo:rsid="0018de7b" style:font-weight-asian="bold" style:font-weight-complex="bold"/>
    </style:style>
    <style:style style:name="T6" style:family="text">
      <style:text-properties fo:font-weight="normal" officeooo:rsid="0018de7b"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1a656a"/>
    </style:style>
    <style:style style:name="T9" style:family="text">
      <style:text-properties fo:font-weight="bold" officeooo:rsid="001a656a" style:font-weight-asian="bold" style:font-weight-complex="bold"/>
    </style:style>
    <style:style style:name="T10" style:family="text">
      <style:text-properties officeooo:rsid="001b627b"/>
    </style:style>
    <style:style style:name="T11" style:family="text">
      <style:text-properties officeooo:rsid="001c893c"/>
    </style:style>
    <style:style style:name="T12" style:family="text">
      <style:text-properties officeooo:rsid="001dbf5b"/>
    </style:style>
    <style:style style:name="T13" style:family="text">
      <style:text-properties fo:color="#18a303" loext:opacity="100%" fo:font-family="'var font-mono'" fo:background-color="transparent" loext:char-shading-value="0">
        <loext:char-complex-color loext:theme-type="accent1" loext:color-type="theme">
          <loext:transformation loext:type="lumoff" loext:value="0"/>
        </loext:char-complex-color>
      </style:text-properties>
    </style:style>
    <style:style style:name="T14" style:family="text">
      <style:text-properties officeooo:rsid="002157fe"/>
    </style:style>
    <style:style style:name="T15"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log project</text:h>
      <text:p text:style-name="P2"/>
      <text:p text:style-name="P3">REQUISITES PLANNING</text:p>
      <text:p text:style-name="P4">The user will be able to:</text:p>
      <text:list text:style-name="L1">
        <text:list-item>
          <text:p text:style-name="P5">view posts on the blog, </text:p>
        </text:list-item>
        <text:list-item>
          <text:p text:style-name="P5">create posts, </text:p>
        </text:list-item>
        <text:list-item>
          <text:p text:style-name="P5">change their visibility to (public and private).</text:p>
        </text:list-item>
        <text:list-item>
          <text:p text:style-name="P5">There should be a type of text editor, where he can write, put images and links, all the post structure.</text:p>
        </text:list-item>
        <text:list-item>
          <text:p text:style-name="P5">He should have a profile section, where he can see all his posts.</text:p>
        </text:list-item>
        <text:list-item>
          <text:p text:style-name="P5">He should be able to click on posts, and as the owner, see the metrics, such as visualizations, likes, sharings and comments.</text:p>
        </text:list-item>
        <text:list-item>
          <text:p text:style-name="P5">He should be able to edit posts.</text:p>
        </text:list-item>
        <text:list-item>
          <text:p text:style-name="P5">He should be able to delete.</text:p>
        </text:list-item>
        <text:list-item>
          <text:p text:style-name="P5">He should be able to like and respond to comments.</text:p>
        </text:list-item>
      </text:list>
      <text:p text:style-name="P4">Entities: User, Post, Comments</text:p>
      <text:p text:style-name="P4">Actions: UserManage, PostManage, Comment<text:span text:style-name="T1">s</text:span>Manage, MetricsManage.</text:p>
      <text:p text:style-name="P4"><text:span text:style-name="T2">PostContent</text:span>: content_id, post_id, content</text:p>
      <text:p text:style-name="P4"><text:span text:style-name="T2">PostMetrics</text:span>: metrics_id, likes_counter, comments_counter, sharings_counter, visualizations_counter, words_counter</text:p>
      <text:p text:style-name="P4"><text:span text:style-name="T2">Profile</text:span>: user_id, photo, description, tags, social_media_list</text:p>
      <text:p text:style-name="P4"><text:span text:style-name="T2">User</text:span>: user_id, name, e-mail, password, profile_id, <text:span text:style-name="T1">created_at</text:span></text:p>
      <text:p text:style-name="P4"><text:span text:style-name="T2">Post</text:span>: post_id, user_id, metrics_id, content_id, <text:span text:style-name="T1">visibility,</text:span> <text:span text:style-name="T1">created_at</text:span></text:p>
      <text:p text:style-name="P6"><text:span text:style-name="T2">PostComment</text:span>: comment_id, post_id, username, e-mail, comment.</text:p>
      <text:p text:style-name="P6"/>
      <text:p text:style-name="P6">Issue mal recortada nasce de modelo de dados mal pensado.</text:p>
      <text:p text:style-name="P6">1. Não sei chat o que me deu, pensei que seria bom usar o Post, como se fosse a sala da gerencia em uma empresa que tem o time de metrics <text:span text:style-name="T3">e os</text:span> criadores de posts. <text:span text:style-name="T3">Qual seria uma boa prática nesse caso? E também pensei em como os posts vão ser criados, tem alguma API que faz aquele estilo de text editor, como o libre office em um site, onde é possível colocar imagens, links, e estruturar o post?</text:span></text:p>
      <text:p text:style-name="P7">Exemplo 1:</text:p>
      <text:p text:style-name="P7">PostLike: like_id, post_id, user_id</text:p>
      <text:p text:style-name="P7"><text:soft-page-break/>PostComment: comment_id, post_id, user_id, comment.</text:p>
      <text:p text:style-name="P7">Post: post_id, user_id, content, visibility, created_at</text:p>
      <text:p text:style-name="P8"><text:span text:style-name="T2">Profile</text:span>: user_id, photo, description, tags, social_media_list</text:p>
      <text:p text:style-name="P8"><text:span text:style-name="T2">User</text:span>: user_id, name, e-mail, password, profile_id, <text:span text:style-name="T1">created_at</text:span></text:p>
      <text:p text:style-name="P7">2. pensei aqui, e não é necessário uma tabela PostMetrics, como você disse, as métricas são dados que variam constantemente, então ao invés de uma tabela, vai ter uma página que vai pegar os dados do banco e calcular as métricas a partir disso. Por exemplo likes, ela pode pegar o número de ocorrências do post.</text:p>
      <text:p text:style-name="P7"/>
      <text:p text:style-name="P7">3. Foi mal pensado da minha parte, estava pensando em colocar usuários anônimos, só que dessa forma perderia as funções de like, ou até mesmo de posts marcados como gostei no perfil do usuário. Então melhor fazer com conta de usuário mesmo.</text:p>
      <text:list text:style-name="List_20_1">
        <text:list-item>
          <text:p text:style-name="P9"><text:span text:style-name="T4">Modelagem de banco de dados relacional não segue hierarquia organizacional, segue </text:span><text:span text:style-name="T5">dependência de dados e frequência de mudança</text:span><text:span text:style-name="T6">. Então a analogia da sala de gerência não funciona.</text:span></text:p>
        </text:list-item>
        <text:list-item>
          <text:p text:style-name="P10">Dados que são calculados a partir de outros dados não merecem coluna própria – eles são query, não um estado. Já que dados são fatos atômicos precisam de linha própria. Então, a regra é, se o valor pode ser derivado de outra tabela com COUNT/SUM, não duplica ele como coluna.</text:p>
        </text:list-item>
      </text:list>
      <text:p text:style-name="P11">→ Rich Text Editor com conteúdo serializado em JSON ou HTML. “spike/pesquisa” – issue.</text:p>
      <text:p text:style-name="P11"/>
      <text:p text:style-name="P11"><text:span text:style-name="T7"/></text:p>
      <text:p text:style-name="P12">PostLike: like_id, post_id<text:span text:style-name="T8">(default)</text:span>, user_id, <text:span text:style-name="T4">comment_id</text:span><text:span text:style-name="T8">(default)</text:span></text:p>
      <text:p text:style-name="P12"/>
      <text:p text:style-name="P13">Profile(1) → (1)User : <text:span text:style-name="T8">OneToOne</text:span></text:p>
      <text:p text:style-name="P14">User(1) → (N)Post : <text:span text:style-name="T5">ForeignKey</text:span></text:p>
      <text:p text:style-name="P14">Post(1) → (N)Comment : <text:span text:style-name="T5">ForeignKey</text:span></text:p>
      <text:p text:style-name="P14">Post(1) → (N)Like : <text:span text:style-name="T5">ForeignKey</text:span></text:p>
      <text:p text:style-name="P14">Comment(1) → (N)Like : <text:span text:style-name="T5">ForeignKey</text:span></text:p>
      <text:p text:style-name="P13"/>
      <text:list text:continue-numbering="true" text:style-name="List_20_1">
        <text:list-item>
          <text:p text:style-name="P15"><text:span text:style-name="T9">DJANGO RELATIONSHIPS</text:span></text:p>
        </text:list-item>
      </text:list>
      <text:p text:style-name="P16">ForeignKey<text:span text:style-name="T7">: Many-to-One-Relationships: One Instance of the Model(the child) can be associated with multiple instances of another model (parent). It creates a database column to store the primary key of the related model.</text:span></text:p>
      <text:p text:style-name="P17">Author (can have multilples books), a Book(can have only one author) → <text:span text:style-name="T8">The book will be the one to use the Author foreign key, because he is the child. <text:s/>It should use the on_delete=models.CASCADE.</text:span></text:p>
      <text:p text:style-name="P18"><text:soft-page-break/>One-to-One Relationships<text:span text:style-name="T7">: Each instance of a model is related to exactaly one instance of another model. It also create a databse column to store the primary key of the related model.</text:span></text:p>
      <text:p text:style-name="P19">A UserProfile is linked to exactly one Person, and vice-versa. The UserProfile will be the one to store the OneToOneField, it should use the on_delete=models.CASCADE.</text:p>
      <text:list text:continue-numbering="true" text:style-name="List_20_1">
        <text:list-item>
          <text:p text:style-name="P20">FK nullable / pollymorphic association</text:p>
          <text:p text:style-name="P21">It´s what is happening in the PostLike table: </text:p>
        </text:list-item>
      </text:list>
      <text:p text:style-name="P22">PostLike: like_id, post_id<text:span text:style-name="T8">(default)</text:span>, user_id, <text:span text:style-name="T4">comment_id</text:span><text:span text:style-name="T8">(default)</text:span></text:p>
      <text:p text:style-name="P23">The question that made me think of this table was: “How can you make the comment like, without duplicating this table?”. And for me, inexperienced with data modeling, thinked that, oh that´s easy, I can just put the comment_id here, and when the user likes a post and comment it goes to the same table, BUT, it´s not that easy. Because each time that the user likes a post, what will go into de comment_id field and vice-versa, there´s also another detail, how the likes and comments will be calculated if they are not separated ? For the first problem, I thought that puting them as default would be a solution, thats when the <text:span text:style-name="T2">FK nullable/Pollymorphic association</text:span> came to me.</text:p>
      <text:p text:style-name="P23">That also generates another question, how can I garantee that on our aplication/database, a line with post_id and comment_id will never come to exist? An the opposite, a line with both of them null?</text:p>
      <text:p text:style-name="P23">→ “generic foreign key” – ContentType Django</text:p>
      <text:p text:style-name="P11">→ <text:span text:style-name="T10">Or simply two separated tables: PostLike and CommentLike</text:span></text:p>
      <text:p text:style-name="P11"/>
      <text:list text:continue-numbering="true" text:style-name="List_20_1">
        <text:list-item>
          <text:p text:style-name="P24">What is generic foreign key in Django?</text:p>
        </text:list-item>
      </text:list>
      <text:p text:style-name="P25">ContentType:<text:span text:style-name="T7"> content_types provide a way to create generic relationships between models. They let you connect a model to any other model without explicitly defining a ForeignKey for each possible relationship. Suppose e have two models: Posts, Comments and Likes. Posts and Comments both should be linked to Likes model. What will we do now?</text:span></text:p>
      <text:p text:style-name="P26">Two sepa<text:span text:style-name="T11">rated</text:span></text:p>
      <text:p text:style-name="P7"/>
      <text:p text:style-name="P27">ARQUITECTURE</text:p>
      <text:p text:style-name="P28">A blog has basically two main flows:</text:p>
      <text:p text:style-name="P28">[ Read ] - User access the blog → Django search for posts → Return with content, comments, likes → React render it.</text:p>
      <text:p text:style-name="P28">[ Write ] - User creates the post → Validate the data → Save it on the database → Returns created post.</text:p>
      <text:p text:style-name="P28">[ UserAuthentication]</text:p>
      <text:p text:style-name="P28">[PostManager]</text:p>
      <text:p text:style-name="P28">[CommentsManager]</text:p>
      <text:p text:style-name="P28">[Metrics]</text:p>
      <text:p text:style-name="P27"><text:soft-page-break/>Presentation Layer:</text:p>
      <text:p text:style-name="P28">The user will be able to create an account, login on the account, see the posts from other users, like and comment on other posts and on his own, he will also be able to make posts, and manage comments, as well as see metrics about visualizations, likes and comments from others users <text:span text:style-name="T12">and save posts as favorites</text:span>.</text:p>
      <text:p text:style-name="P28">He will be able to edit, and on top of every post should show the last update date, so every time he actually edit something on the post, this date will be updated.</text:p>
      <text:p text:style-name="P28">He will also be able to arquive his posts with the visibility option, changing it to public or private.</text:p>
      <text:p text:style-name="P28">It is also possible to delete the post.</text:p>
      <text:p text:style-name="P28">Regarding his profile, when he opens the user profile he will be able to see his photo, username and a option to change password, or delete account, it could be with an settings icon. In his profile will also show a list with all his posts, and a filter to search posts by tags, that was on his posts and for publics and private posts.</text:p>
      <text:p text:style-name="P28">In the posts, there will be options such as edit, change visibility, see metrics and delete.</text:p>
      <text:p text:style-name="P28">Edit → will show the post in the editor page, like in the creation.</text:p>
      <text:p text:style-name="P28">Change visibility → Will just show a dropbar with the opposite option as the actual one.</text:p>
      <text:p text:style-name="P28">See metrics → <text:span text:style-name="T12">Will open a section with the post metrics such as visualizations in a certain period of time (in a graphic), the likes, comments (will show the comments), saved as favorite.</text:span></text:p>
      <text:p text:style-name="P28"/>
      <text:p text:style-name="P29">In the posts section, there will be a search bar with filters, with tags, the most readed and famous.</text:p>
      <text:p text:style-name="P29">When a user clicks to create a new post, there will be a card saying the most searched and famous tags from a certain theme, the user will add tags into the post, from the theme, and topics, the system will show a kind of text editor, with paragraphs and text structures, he will be able to insert images, the editor will generate a references section with the inputed links following the ABNT norms. He will also be able to insert citations, and the text editor will put it into a certain format.</text:p>
      <text:p text:style-name="P28">→ <text:span text:style-name="T12">Favorites ( see posts that was saved as favorites, delete from favorites)</text:span></text:p>
      <text:p text:style-name="P28">→ <text:span text:style-name="T12">Follow user and Unfollow (stay in touch with others users content, when they post something new, an notification will arrive to you)</text:span></text:p>
      <text:p text:style-name="P28">→ <text:span text:style-name="T12">Notifications (New followers, new posts from the followeds users, likes, comments)</text:span></text:p>
      <text:p text:style-name="P28"/>
      <text:p text:style-name="P29">Everything above are ideas, firstly I will do the basic project, and by time I will improve it.</text:p>
      <text:p text:style-name="P30">MVP (Mínimo viável)– essential</text:p>
      <text:p text:style-name="P31">- Autenticação (criar conta, login)</text:p>
      <text:p text:style-name="P31">- Criar e listar posts</text:p>
      <text:p text:style-name="P31">- Comentários</text:p>
      <text:p text:style-name="P31">- Likes em posts</text:p>
      <text:p text:style-name="P31"><text:soft-page-break/>- Perfil básico</text:p>
      <text:p text:style-name="P31">- Editar/deletar posts próprios</text:p>
      <text:p text:style-name="P30"><text:span text:style-name="Strong_20_Emphasis">Melhorias futuras:</text:span></text:p>
      <text:p text:style-name="P31">- Favoritos</text:p>
      <text:p text:style-name="P31">- Seguir usuários</text:p>
      <text:p text:style-name="P31">- Notificações</text:p>
      <text:p text:style-name="P31">- Métricas avançadas</text:p>
      <text:p text:style-name="P31">- Rich text editor com referências ABNT</text:p>
      <text:p text:style-name="P31">- Tags e filtros</text:p>
      <text:p text:style-name="P31">Blog – it´s an open system (B2C) – a lot of users (readers and writers), public data and focus on performance and scalability.</text:p>
      <text:h text:style-name="P32" text:outline-level="2">BLOG PROJECT — PLANNING &amp; ARCHITECTURE</text:h>
      <text:h text:style-name="P33" text:outline-level="3">1. REQUISITES PLANNING</text:h>
      <text:h text:style-name="P34" text:outline-level="4">Core Entities</text:h>
      <text:list text:style-name="L2">
        <text:list-item>
          <text:p text:style-name="P35">User </text:p>
        </text:list-item>
        <text:list-item>
          <text:p text:style-name="P35">Post </text:p>
        </text:list-item>
        <text:list-item>
          <text:p text:style-name="P35">Comments </text:p>
        </text:list-item>
        <text:list-item>
          <text:p text:style-name="P36">PostLike </text:p>
        </text:list-item>
      </text:list>
      <text:h text:style-name="P34" text:outline-level="4">Data Models</text:h>
      <text:p text:style-name="P37"><text:span text:style-name="Strong_20_Emphasis">User</text:span></text:p>
      <text:list text:style-name="L3">
        <text:list-item>
          <text:p text:style-name="P38">user_id (PK) </text:p>
        </text:list-item>
        <text:list-item>
          <text:p text:style-name="P38">name </text:p>
        </text:list-item>
        <text:list-item>
          <text:p text:style-name="P38">email </text:p>
        </text:list-item>
        <text:list-item>
          <text:p text:style-name="P38">password </text:p>
        </text:list-item>
        <text:list-item>
          <text:p text:style-name="P38">profile_id (FK → Profile) </text:p>
        </text:list-item>
        <text:list-item>
          <text:p text:style-name="P39">created_at </text:p>
        </text:list-item>
      </text:list>
      <text:p text:style-name="P37"><text:span text:style-name="Strong_20_Emphasis">Profile</text:span> (1:1 with User)</text:p>
      <text:list text:style-name="L4">
        <text:list-item>
          <text:p text:style-name="P40">profile_id (PK) </text:p>
        </text:list-item>
        <text:list-item>
          <text:p text:style-name="P40">photo </text:p>
        </text:list-item>
        <text:list-item>
          <text:p text:style-name="P40">description </text:p>
        </text:list-item>
        <text:list-item>
          <text:p text:style-name="P40">tags </text:p>
        </text:list-item>
        <text:list-item>
          <text:p text:style-name="P41">social_media_list </text:p>
        </text:list-item>
      </text:list>
      <text:p text:style-name="P37"><text:span text:style-name="Strong_20_Emphasis">Post</text:span></text:p>
      <text:list text:style-name="L5">
        <text:list-item>
          <text:p text:style-name="P42">post_id (PK) </text:p>
        </text:list-item>
        <text:list-item>
          <text:p text:style-name="P42">user_id (FK → User) </text:p>
        </text:list-item>
        <text:list-item>
          <text:p text:style-name="P42">content </text:p>
        </text:list-item>
        <text:list-item>
          <text:p text:style-name="P42"><text:soft-page-break/>visibility (public/private) </text:p>
        </text:list-item>
        <text:list-item>
          <text:p text:style-name="P42">created_at </text:p>
        </text:list-item>
        <text:list-item>
          <text:p text:style-name="P43">updated_at </text:p>
        </text:list-item>
      </text:list>
      <text:p text:style-name="P37"><text:span text:style-name="Strong_20_Emphasis">PostComment</text:span></text:p>
      <text:list text:style-name="L6">
        <text:list-item>
          <text:p text:style-name="P44">comment_id (PK) </text:p>
        </text:list-item>
        <text:list-item>
          <text:p text:style-name="P44">post_id (FK → Post) </text:p>
        </text:list-item>
        <text:list-item>
          <text:p text:style-name="P44">user_id (FK → User) </text:p>
        </text:list-item>
        <text:list-item>
          <text:p text:style-name="P44">comment_text </text:p>
        </text:list-item>
        <text:list-item>
          <text:p text:style-name="P45">created_at </text:p>
        </text:list-item>
      </text:list>
      <text:p text:style-name="P37"><text:span text:style-name="Strong_20_Emphasis">PostLike</text:span></text:p>
      <text:list text:style-name="L7">
        <text:list-item>
          <text:p text:style-name="P46">like_id (PK) </text:p>
        </text:list-item>
        <text:list-item>
          <text:p text:style-name="P46">post_id (FK → Post) </text:p>
        </text:list-item>
        <text:list-item>
          <text:p text:style-name="P46">user_id (FK → User) </text:p>
        </text:list-item>
        <text:list-item>
          <text:p text:style-name="P47">created_at </text:p>
        </text:list-item>
      </text:list>
      <text:p text:style-name="P37"><text:span text:style-name="Strong_20_Emphasis">CommentLike</text:span></text:p>
      <text:list text:style-name="L8">
        <text:list-item>
          <text:p text:style-name="P48">like_id (PK) </text:p>
        </text:list-item>
        <text:list-item>
          <text:p text:style-name="P48">comment_id (FK → PostComment) </text:p>
        </text:list-item>
        <text:list-item>
          <text:p text:style-name="P48">user_id (FK → User) </text:p>
        </text:list-item>
        <text:list-item>
          <text:p text:style-name="P49">created_at </text:p>
        </text:list-item>
      </text:list>
      <text:p text:style-name="P50"/>
      <text:h text:style-name="P33" text:outline-level="3">2. DATABASE RELATIONSHIPS</text:h>
      <text:p text:style-name="P51"><text:span text:style-name="Source_20_Text"><text:span text:style-name="T13">Profile (1) → (1) User : OneToOneField</text:span></text:span></text:p>
      <text:p text:style-name="P52"><text:span text:style-name="Source_20_Text"><text:span text:style-name="T13">User (1) → (N) Post : ForeignKey</text:span></text:span></text:p>
      <text:p text:style-name="P52"><text:span text:style-name="Source_20_Text"><text:span text:style-name="T13">User (1) → (N) PostComment : ForeignKey</text:span></text:span></text:p>
      <text:p text:style-name="P52"><text:span text:style-name="Source_20_Text"><text:span text:style-name="T13">User (1) → (N) PostLike : ForeignKey</text:span></text:span></text:p>
      <text:p text:style-name="P52"><text:span text:style-name="Source_20_Text"><text:span text:style-name="T13">Post (1) → (N) PostComment : ForeignKey</text:span></text:span></text:p>
      <text:p text:style-name="P52"><text:span text:style-name="Source_20_Text"><text:span text:style-name="T13">Post (1) → (N) PostLike : ForeignKey</text:span></text:span></text:p>
      <text:p text:style-name="P52"><text:span text:style-name="Source_20_Text"><text:span text:style-name="T13">PostComment (1) → (N) CommentLike : ForeignKey</text:span></text:span></text:p>
      <text:h text:style-name="P34" text:outline-level="4">Key Principles</text:h>
      <text:list text:style-name="L9">
        <text:list-item>
          <text:p text:style-name="P53">Metrics are <text:span text:style-name="Strong_20_Emphasis">calculated from queries</text:span> (COUNT/SUM), not stored as columns </text:p>
        </text:list-item>
        <text:list-item>
          <text:p text:style-name="P53">Use separate tables for PostLike and CommentLike to avoid nullable FK conflicts </text:p>
        </text:list-item>
        <text:list-item>
          <text:p text:style-name="P54">Use <text:span text:style-name="Source_20_Text">on_delete=models.CASCADE</text:span> for sensitive relationships </text:p>
        </text:list-item>
      </text:list>
      <text:p text:style-name="P50"/>
      <text:h text:style-name="P33" text:outline-level="3">3. CORE FLOWS</text:h>
      <text:h text:style-name="P34" text:outline-level="4">Read Flow</text:h>
      <text:p text:style-name="P37">User accesses blog → Django retrieves posts → Returns with comments, likes → React renders</text:p>
      <text:h text:style-name="P34" text:outline-level="4"><text:soft-page-break/>Write Flow</text:h>
      <text:p text:style-name="P37">User creates/edits post → Validates data → Saves to database → Returns created/updated post</text:p>
      <text:h text:style-name="P34" text:outline-level="4">Authentication Flow</text:h>
      <text:p text:style-name="P37">User registers/logs in → System validates credentials → Generates JWT token → User authenticated</text:p>
      <text:p text:style-name="P50"/>
      <text:h text:style-name="P33" text:outline-level="3">4. MVP (MINIMUM VIABLE PRODUCT)</text:h>
      <text:h text:style-name="P34" text:outline-level="4">Phase 1 — Basic Features</text:h>
      <text:list text:style-name="L10">
        <text:list-item>
          <text:p text:style-name="P55">✓ User authentication (register, login) </text:p>
        </text:list-item>
        <text:list-item>
          <text:p text:style-name="P55">✓ Create posts </text:p>
        </text:list-item>
        <text:list-item>
          <text:p text:style-name="P55">✓ List posts </text:p>
        </text:list-item>
        <text:list-item>
          <text:p text:style-name="P55">✓ View single post </text:p>
        </text:list-item>
        <text:list-item>
          <text:p text:style-name="P55">✓ Like posts </text:p>
        </text:list-item>
        <text:list-item>
          <text:p text:style-name="P55">✓ Comment on posts </text:p>
        </text:list-item>
        <text:list-item>
          <text:p text:style-name="P55">✓ Edit own posts </text:p>
        </text:list-item>
        <text:list-item>
          <text:p text:style-name="P55">✓ Delete own posts </text:p>
        </text:list-item>
        <text:list-item>
          <text:p text:style-name="P55">✓ User profile page </text:p>
        </text:list-item>
        <text:list-item>
          <text:p text:style-name="P56">✓ Post visibility (public/private) </text:p>
        </text:list-item>
      </text:list>
      <text:p text:style-name="P50"/>
      <text:h text:style-name="P33" text:outline-level="3">5. FUTURE IMPROVEMENTS</text:h>
      <text:h text:style-name="P34" text:outline-level="4">Phase 2 — Enhanced Features</text:h>
      <text:list text:style-name="L11">
        <text:list-item>
          <text:p text:style-name="P57">Post search and filters </text:p>
        </text:list-item>
        <text:list-item>
          <text:p text:style-name="P57">Tags system </text:p>
        </text:list-item>
        <text:list-item>
          <text:p text:style-name="P57">Save posts as favorites </text:p>
        </text:list-item>
        <text:list-item>
          <text:p text:style-name="P57">Follow/Unfollow users </text:p>
        </text:list-item>
        <text:list-item>
          <text:p text:style-name="P57">Post metrics (visualizations, likes, comments) </text:p>
        </text:list-item>
        <text:list-item>
          <text:p text:style-name="P57">Last update date on posts </text:p>
        </text:list-item>
        <text:list-item>
          <text:p text:style-name="P57">Rich text editor with images and links </text:p>
        </text:list-item>
        <text:list-item>
          <text:p text:style-name="P57">References generation (ABNT norms) </text:p>
        </text:list-item>
        <text:list-item>
          <text:p text:style-name="P58">Citation formatting </text:p>
        </text:list-item>
      </text:list>
      <text:h text:style-name="P34" text:outline-level="4">Phase 3 — Advanced Features</text:h>
      <text:list text:style-name="L12">
        <text:list-item>
          <text:p text:style-name="P59">Notifications (new followers, new posts, likes, comments) </text:p>
        </text:list-item>
        <text:list-item>
          <text:p text:style-name="P59">Post recommendations </text:p>
        </text:list-item>
        <text:list-item>
          <text:p text:style-name="P59">Advanced analytics </text:p>
        </text:list-item>
        <text:list-item>
          <text:p text:style-name="P60">Social sharing </text:p>
        </text:list-item>
      </text:list>
      <text:p text:style-name="P50"/>
      <text:h text:style-name="P33" text:outline-level="3">6. PRESENTATION LAYER</text:h>
      <text:h text:style-name="P34" text:outline-level="4">User Profile</text:h>
      <text:list text:style-name="L13">
        <text:list-item>
          <text:p text:style-name="P61">Photo </text:p>
        </text:list-item>
        <text:list-item>
          <text:p text:style-name="P61"><text:soft-page-break/>Username </text:p>
        </text:list-item>
        <text:list-item>
          <text:p text:style-name="P61">List of user's posts </text:p>
        </text:list-item>
        <text:list-item>
          <text:p text:style-name="P61">Filter posts by tags </text:p>
        </text:list-item>
        <text:list-item>
          <text:p text:style-name="P61">Filter by visibility (public/private) </text:p>
        </text:list-item>
        <text:list-item>
          <text:p text:style-name="P62">Settings (change password, delete account) </text:p>
        </text:list-item>
      </text:list>
      <text:h text:style-name="P34" text:outline-level="4">Post Management</text:h>
      <text:list text:style-name="L14">
        <text:list-item>
          <text:p text:style-name="P63"><text:span text:style-name="Strong_20_Emphasis">Create Post</text:span> — Text editor with images, links, and structures </text:p>
        </text:list-item>
        <text:list-item>
          <text:p text:style-name="P63"><text:span text:style-name="Strong_20_Emphasis">Edit Post</text:span> — Update post in editor, show last updated date </text:p>
        </text:list-item>
        <text:list-item>
          <text:p text:style-name="P63"><text:span text:style-name="Strong_20_Emphasis">Change Visibility</text:span> — Toggle between public/private </text:p>
        </text:list-item>
        <text:list-item>
          <text:p text:style-name="P63"><text:span text:style-name="Strong_20_Emphasis">See Metrics</text:span> — Visualizations timeline, likes count, comments list, favorites count </text:p>
        </text:list-item>
        <text:list-item>
          <text:p text:style-name="P64"><text:span text:style-name="Strong_20_Emphasis">Delete Post</text:span> — Remove post permanently </text:p>
        </text:list-item>
      </text:list>
      <text:h text:style-name="P34" text:outline-level="4">Posts Discovery</text:h>
      <text:list text:style-name="L15">
        <text:list-item>
          <text:p text:style-name="P65">Search bar with filters </text:p>
        </text:list-item>
        <text:list-item>
          <text:p text:style-name="P65">Popular tags section </text:p>
        </text:list-item>
        <text:list-item>
          <text:p text:style-name="P65">Most read posts </text:p>
        </text:list-item>
        <text:list-item>
          <text:p text:style-name="P66">Most shared posts </text:p>
        </text:list-item>
      </text:list>
      <text:p text:style-name="P50"/>
      <text:h text:style-name="P33" text:outline-level="3">7. RICH TEXT EDITOR CONSIDERATIONS</text:h>
      <text:list text:style-name="L16">
        <text:list-item>
          <text:p text:style-name="P67">Library needed: <text:span text:style-name="Strong_20_Emphasis">TipTap</text:span>, <text:span text:style-name="Strong_20_Emphasis">Draft.js</text:span>, or <text:span text:style-name="Strong_20_Emphasis">Slate.js</text:span> </text:p>
        </text:list-item>
        <text:list-item>
          <text:p text:style-name="P67">Content serialization: JSON or HTML </text:p>
        </text:list-item>
        <text:list-item>
          <text:p text:style-name="P67">Features: paragraphs, text structures, image insertion, link insertion </text:p>
        </text:list-item>
        <text:list-item>
          <text:p text:style-name="P68">Future: References generation (ABNT norms), citation formatting </text:p>
        </text:list-item>
      </text:list>
      <text:p text:style-name="P50"/>
      <text:h text:style-name="P33" text:outline-level="3">8. NOTES &amp; BEST PRACTICES</text:h>
      <text:list text:style-name="L17">
        <text:list-item>
          <text:p text:style-name="P69">Avoid duplicating calculated data as columns </text:p>
        </text:list-item>
        <text:list-item>
          <text:p text:style-name="P69">Use separate tables instead of polymorphic associations to maintain data integrity </text:p>
        </text:list-item>
        <text:list-item>
          <text:p text:style-name="P69">Implement proper validation at both serializer and database levels </text:p>
        </text:list-item>
        <text:list-item>
          <text:p text:style-name="P69">Plan for scalability from the start (indexing, caching for popular posts) </text:p>
        </text:list-item>
        <text:list-item>
          <text:p text:style-name="P70">Consider soft deletes for audit trail purposes</text:p>
        </text:list-item>
      </text:list>
      <text:p text:style-name="P71">Firstly, by experience I learned that you actually need to setup your github environment!</text:p>
      <text:p text:style-name="P72"># DEVELOPMENT</text:p>
      <text:p text:style-name="P72">→ SETUP (Setting up the environment)</text:p>
      <text:p text:style-name="P72">- <text:span text:style-name="T14">blog-project</text:span></text:p>
      <text:p text:style-name="P72">--<text:span text:style-name="T14">backend</text:span></text:p>
      <text:p text:style-name="P72">---<text:span text:style-name="T14">myproject</text:span></text:p>
      <text:p text:style-name="P72">--<text:span text:style-name="T14">frontend</text:span></text:p>
      <text:p text:style-name="P72">Creating the virtual environment</text:p>
      <text:p text:style-name="P72">$ mkvirtualenv app-blog</text:p>
      <text:p text:style-name="P73"><text:soft-page-break/>$ cd backend</text:p>
      <text:p text:style-name="P72">Creating django project</text:p>
      <text:p text:style-name="P72">$ django-admin stratproject blog-project</text:p>
      <text:p text:style-name="P72">Access the env</text:p>
      <text:p text:style-name="P72">$ deactivate</text:p>
      <text:p text:style-name="P72">$ workon app-blog</text:p>
      <text:p text:style-name="P73">$ python manage.py runserver</text:p>
      <text:p text:style-name="P73"/>
      <table:table table:name="Tabela1" table:style-name="Tabela1">
        <table:table-column table:style-name="Tabela1.A"/>
        <table:table-row>
          <table:table-cell table:style-name="Tabela1.A1" office:value-type="string">
            <text:p text:style-name="P74"><text:span text:style-name="T7">##</text:span> SETUP INICIAL</text:p>
            <text:p text:style-name="P74"/>
            <text:p text:style-name="P75">git checkout main</text:p>
            <text:p text:style-name="P75">git pull origin main # sempre atualiza antes de criar branch nova</text:p>
            <text:p text:style-name="P75"/>
            <text:p text:style-name="P74">Criando e trabalhando nas branchs</text:p>
            <text:p text:style-name="P74">1. Feature</text:p>
            <text:p text:style-name="P76"># cria e já entra na branch</text:p>
            <text:p text:style-name="P76">git checkout -b feature/authentication</text:p>
            <text:p text:style-name="P76"/>
            <text:p text:style-name="P76"># Trabalha, commita normalmente</text:p>
            <text:p text:style-name="P76">git add .</text:p>
            <text:p text:style-name="P76">git commit -m “<text:span text:style-name="T2">feat</text:span>: add JWT authentication setup”</text:p>
            <text:p text:style-name="P76"/>
            <text:p text:style-name="P76"># Sobe pro github</text:p>
            <text:p text:style-name="P76">git push origin feature/authentication</text:p>
            <text:p text:style-name="P76"/>
            <text:p text:style-name="P74">2. Bugfix</text:p>
            <text:p text:style-name="P76">git checkout main</text:p>
            <text:p text:style-name="P76">git pull origin main #sempre parte da main abandonada</text:p>
            <text:p text:style-name="P76">git checkout -b bugfix/login-redirect-error</text:p>
            <text:p text:style-name="P76"/>
            <text:p text:style-name="P76">git add .</text:p>
            <text:p text:style-name="P76">git commit -m “<text:span text:style-name="T2">fix</text:span>: correct redirect after login”</text:p>
            <text:p text:style-name="P76">git push origin bugfix/login-redirect-error</text:p>
            <text:p text:style-name="P76"/>
            <text:p text:style-name="P77">3. Refactor – melhorar código sem mudar comportamento</text:p>
            <text:p text:style-name="P78">git checkout -b refactor/post-serializer</text:p>
            <text:p text:style-name="P78"/>
            <text:p text:style-name="P78">git add .</text:p>
            <text:p text:style-name="P78">git commit -m “<text:span text:style-name="T2">refactor</text:span>: simplify post serializer validation”</text:p>
            <text:p text:style-name="P78">git push origin refactor/post-serializer</text:p>
            <text:p text:style-name="P78"/>
            <text:p text:style-name="P79">Integrando de volta pra main</text:p>
            <text:p text:style-name="P80">O fluxo correto é via Pull Request no GitHub – não fazer merge direto na máquina, por que o PR é onde você revisa o diff, escreve descrição e documenta o que foi feito. No terminal eu subo a branch e abro o PR pelo GitHub.</text:p>
            <text:p text:style-name="P81">- Localmente (só em projetos pessoais mesmo)</text:p>
            <text:p text:style-name="P80">git chekout main</text:p>
            <text:p text:style-name="P80"><text:soft-page-break/>git pull origin main</text:p>
            <text:p text:style-name="P80">git merge feature/authentication</text:p>
            <text:p text:style-name="P80"/>
            <text:p text:style-name="P80">git push origin main</text:p>
            <text:p text:style-name="P75"/>
            <text:p text:style-name="P82">* Depois de integrar, deletar a branch pra não acumular.</text:p>
            <text:p text:style-name="P82"/>
            <text:p text:style-name="P82"># deleta local</text:p>
            <text:p text:style-name="P82">git branch -d feature/authentication</text:p>
            <text:p text:style-name="P82"/>
            <text:p text:style-name="P82"># deleta no github.com</text:p>
            <text:p text:style-name="P82">git push origin –delete feature/authentication</text:p>
            <text:p text:style-name="P82"><text:span text:style-name="T2"/></text:p>
          </table:table-cell>
        </table:table-row>
        <table:table-row>
          <table:table-cell table:style-name="Tabela1.A2" office:value-type="string">
            <text:p text:style-name="P83">CONVENÇÃO DE COMMITS</text:p>
            <text:p text:style-name="P79"/>
            <text:p text:style-name="P80"><text:span text:style-name="T15">feat:</text:span> nova funcionalidade</text:p>
            <text:p text:style-name="P80"><text:span text:style-name="T15">fix</text:span>: correção de bug</text:p>
            <text:p text:style-name="P80"><text:span text:style-name="T15">refactor</text:span>: refatoração sem mudar comportamento</text:p>
            <text:p text:style-name="P80"><text:span text:style-name="T15">docs</text:span>: só documentação </text:p>
            <text:p text:style-name="P80"><text:span text:style-name="T15">chore</text:span>: configuração, dependências</text:p>
          </table:table-cell>
        </table:table-row>
        <table:table-row>
          <table:table-cell table:style-name="Tabela1.A2" office:value-type="string">
            <text:p text:style-name="P84">FLUXO</text:p>
            <text:p text:style-name="P85">main (estável)</text:p>
            <text:p text:style-name="P85"><text:s text:c="2"/>│</text:p>
            <text:p text:style-name="P85"><text:s text:c="2"/>├── git checkout -b feature/crud-posts</text:p>
            <text:p text:style-name="P85"><text:s text:c="2"/>│ <text:s text:c="4"/>→ desenvolve → commita → push → PR → merge → deleta branch</text:p>
            <text:p text:style-name="P85"><text:s text:c="2"/>│</text:p>
            <text:p text:style-name="P85"><text:s text:c="2"/>├── git checkout -b bugfix/post-slug-error</text:p>
            <text:p text:style-name="P85"><text:s text:c="2"/>│ <text:s text:c="4"/>→ corrige → commita → push → PR → merge → deleta branch</text:p>
            <text:p text:style-name="P85"><text:s text:c="2"/>│</text:p>
            <text:p text:style-name="P85"><text:s text:c="2"/>└── git checkout -b refactor/views-cleanup</text:p>
            <text:p text:style-name="P85"><text:s text:c="8"/>→ refatora → commita → push → PR → merge → deleta branch</text:p>
            <text:p text:style-name="P85"/>
            <text:p text:style-name="P85">*<text:span text:style-name="T2">SEMPRE PUXAR MAIN ATUALIZADA ANTES DE CRIAR QUALQUER BRANCH NOVA.</text:span></text:p>
            <text:p text:style-name="P85"><text:span text:style-name="T7"/></text:p>
            <text:p text:style-name="P86"># Dentro da feature branch, antes de abrir PR.</text:p>
            <text:p text:style-name="P85">git fetch origin</text:p>
            <text:p text:style-name="P85">git rebase origin/main # ou git merge origin/main</text:p>
            <text:p text:style-name="P85"/>
          </table:table-cell>
        </table:table-row>
      </table:table>
      <text:p text:style-name="P73"/>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09:27:39.666206400</meta:creation-date>
    <dc:date>2026-07-05T22:01:44.512566500</dc:date>
    <meta:editing-duration>PT4H53M44S</meta:editing-duration>
    <meta:editing-cycles>2</meta:editing-cycles>
    <meta:generator>LibreOffice/26.2.1.2$Windows_X86_64 LibreOffice_project/620$Build-2</meta:generator>
    <meta:document-statistic meta:table-count="1" meta:image-count="0" meta:object-count="0" meta:page-count="10" meta:paragraph-count="287" meta:word-count="2401" meta:character-count="14349" meta:non-whitespace-character-count="12201"/>
  </office:meta>
</office:document-meta>
</file>