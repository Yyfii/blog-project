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692f2" officeooo:paragraph-rsid="001692f2"/>
    </style:style>
    <style:style style:name="P2" style:family="paragraph" style:parent-style-name="Text_20_body">
      <style:text-properties officeooo:paragraph-rsid="001692f2"/>
    </style:style>
    <style:style style:name="P3" style:family="paragraph" style:parent-style-name="Text_20_body">
      <style:text-properties fo:font-weight="bold" officeooo:rsid="001692f2" officeooo:paragraph-rsid="001692f2" style:font-weight-asian="bold" style:font-weight-complex="bold"/>
    </style:style>
    <style:style style:name="P4" style:family="paragraph" style:parent-style-name="Text_20_body">
      <style:text-properties officeooo:rsid="001692f2" officeooo:paragraph-rsid="001692f2"/>
    </style:style>
    <style:style style:name="P5" style:family="paragraph" style:parent-style-name="Text_20_body" style:list-style-name="L1">
      <style:text-properties officeooo:rsid="001692f2" officeooo:paragraph-rsid="001692f2"/>
    </style:style>
    <style:style style:name="P6" style:family="paragraph" style:parent-style-name="Text_20_body">
      <style:text-properties officeooo:rsid="001737f3" officeooo:paragraph-rsid="001737f3"/>
    </style:style>
    <style:style style:name="P7" style:family="paragraph" style:parent-style-name="Text_20_body">
      <style:text-properties officeooo:rsid="00188128" officeooo:paragraph-rsid="00188128"/>
    </style:style>
    <style:style style:name="P8" style:family="paragraph" style:parent-style-name="Text_20_body">
      <style:text-properties officeooo:rsid="001692f2" officeooo:paragraph-rsid="00188128"/>
    </style:style>
    <style:style style:name="P9" style:family="paragraph" style:parent-style-name="Text_20_body" style:list-style-name="List_20_1">
      <style:text-properties officeooo:paragraph-rsid="0018de7b"/>
    </style:style>
    <style:style style:name="P10" style:family="paragraph" style:parent-style-name="Text_20_body" style:list-style-name="List_20_1">
      <style:text-properties fo:font-weight="normal" officeooo:rsid="0018de7b" officeooo:paragraph-rsid="0018de7b" style:font-weight-asian="normal" style:font-weight-complex="normal"/>
    </style:style>
    <style:style style:name="P11" style:family="paragraph" style:parent-style-name="Text_20_body">
      <style:text-properties fo:font-weight="normal" officeooo:rsid="0018de7b" officeooo:paragraph-rsid="0018de7b" style:font-weight-asian="normal" style:font-weight-complex="normal"/>
    </style:style>
    <style:style style:name="P12" style:family="paragraph" style:parent-style-name="Text_20_body">
      <style:text-properties officeooo:rsid="00188128" officeooo:paragraph-rsid="0018de7b"/>
    </style:style>
    <style:style style:name="P13" style:family="paragraph" style:parent-style-name="Text_20_body">
      <style:text-properties officeooo:rsid="0018de7b" officeooo:paragraph-rsid="0018de7b"/>
    </style:style>
    <style:style style:name="P14" style:family="paragraph" style:parent-style-name="Text_20_body">
      <style:text-properties officeooo:rsid="001a656a" officeooo:paragraph-rsid="001a656a"/>
    </style:style>
    <style:style style:name="P15" style:family="paragraph" style:parent-style-name="Text_20_body" style:list-style-name="List_20_1">
      <style:text-properties officeooo:paragraph-rsid="001a656a"/>
    </style:style>
    <style:style style:name="P16" style:family="paragraph" style:parent-style-name="Text_20_body">
      <style:text-properties fo:font-weight="bold" officeooo:rsid="0018de7b" officeooo:paragraph-rsid="0018de7b" style:font-weight-asian="bold" style:font-weight-complex="bold"/>
    </style:style>
    <style:style style:name="P17" style:family="paragraph" style:parent-style-name="Text_20_body">
      <style:text-properties fo:font-weight="normal" officeooo:rsid="0018de7b" officeooo:paragraph-rsid="001a656a" style:font-weight-asian="normal" style:font-weight-complex="normal"/>
    </style:style>
    <style:style style:name="P18" style:family="paragraph" style:parent-style-name="Text_20_body">
      <style:text-properties fo:font-weight="bold" officeooo:rsid="001a656a" officeooo:paragraph-rsid="001a656a" style:font-weight-asian="bold" style:font-weight-complex="bold"/>
    </style:style>
    <style:style style:name="P19" style:family="paragraph" style:parent-style-name="Text_20_body">
      <style:text-properties fo:font-weight="normal" officeooo:rsid="001a656a" officeooo:paragraph-rsid="001a656a" style:font-weight-asian="normal" style:font-weight-complex="normal"/>
    </style:style>
    <style:style style:name="P20" style:family="paragraph" style:parent-style-name="Text_20_body" style:list-style-name="List_20_1">
      <style:text-properties fo:font-weight="bold" officeooo:rsid="001b627b" officeooo:paragraph-rsid="001b627b" style:font-weight-asian="bold" style:font-weight-complex="bold"/>
    </style:style>
    <style:style style:name="P21" style:family="paragraph" style:parent-style-name="Text_20_body" style:list-style-name="List_20_1">
      <style:text-properties fo:font-weight="normal" officeooo:rsid="001b627b" officeooo:paragraph-rsid="001b627b" style:font-weight-asian="normal" style:font-weight-complex="normal"/>
    </style:style>
    <style:style style:name="P22" style:family="paragraph" style:parent-style-name="Text_20_body">
      <style:text-properties officeooo:rsid="00188128" officeooo:paragraph-rsid="001b627b"/>
    </style:style>
    <style:style style:name="P23" style:family="paragraph" style:parent-style-name="Text_20_body">
      <style:text-properties officeooo:rsid="001b627b" officeooo:paragraph-rsid="001b627b"/>
    </style:style>
    <style:style style:name="P24" style:family="paragraph" style:parent-style-name="Text_20_body" style:list-style-name="List_20_1">
      <style:text-properties fo:font-weight="bold" officeooo:rsid="001bbb19" officeooo:paragraph-rsid="001bbb19" style:font-weight-asian="bold" style:font-weight-complex="bold"/>
    </style:style>
    <style:style style:name="P25" style:family="paragraph" style:parent-style-name="Text_20_body">
      <style:text-properties fo:font-weight="bold" officeooo:rsid="001bbb19" officeooo:paragraph-rsid="001bbb19" style:font-weight-asian="bold" style:font-weight-complex="bold"/>
    </style:style>
    <style:style style:name="P26" style:family="paragraph" style:parent-style-name="Text_20_body">
      <style:text-properties fo:font-weight="normal" officeooo:rsid="001bbb19" officeooo:paragraph-rsid="001bbb19" style:font-weight-asian="normal" style:font-weight-complex="normal"/>
    </style:style>
    <style:style style:name="T1" style:family="text">
      <style:text-properties officeooo:rsid="001737f3"/>
    </style:style>
    <style:style style:name="T2" style:family="text">
      <style:text-properties fo:font-weight="bold" style:font-weight-asian="bold" style:font-weight-complex="bold"/>
    </style:style>
    <style:style style:name="T3" style:family="text">
      <style:text-properties officeooo:rsid="00188128"/>
    </style:style>
    <style:style style:name="T4" style:family="text">
      <style:text-properties officeooo:rsid="0018de7b"/>
    </style:style>
    <style:style style:name="T5" style:family="text">
      <style:text-properties fo:font-weight="bold" officeooo:rsid="0018de7b" style:font-weight-asian="bold" style:font-weight-complex="bold"/>
    </style:style>
    <style:style style:name="T6" style:family="text">
      <style:text-properties fo:font-weight="normal" officeooo:rsid="0018de7b" style:font-weight-asian="normal" style:font-weight-complex="normal"/>
    </style:style>
    <style:style style:name="T7" style:family="text">
      <style:text-properties fo:font-weight="normal" style:font-weight-asian="normal" style:font-weight-complex="normal"/>
    </style:style>
    <style:style style:name="T8" style:family="text">
      <style:text-properties officeooo:rsid="001a656a"/>
    </style:style>
    <style:style style:name="T9" style:family="text">
      <style:text-properties fo:font-weight="bold" officeooo:rsid="001a656a" style:font-weight-asian="bold" style:font-weight-complex="bold"/>
    </style:style>
    <style:style style:name="T10" style:family="text">
      <style:text-properties officeooo:rsid="001b627b"/>
    </style:style>
    <style:style style:name="T11" style:family="text">
      <style:text-properties officeooo:rsid="001c893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log project</text:h>
      <text:p text:style-name="P2"/>
      <text:p text:style-name="P3">REQUISITES PLANNING</text:p>
      <text:p text:style-name="P4">The user will be able to:</text:p>
      <text:list text:style-name="L1">
        <text:list-item>
          <text:p text:style-name="P5">view posts on the blog, </text:p>
        </text:list-item>
        <text:list-item>
          <text:p text:style-name="P5">create posts, </text:p>
        </text:list-item>
        <text:list-item>
          <text:p text:style-name="P5">change their visibility to (public and private).</text:p>
        </text:list-item>
        <text:list-item>
          <text:p text:style-name="P5">There should be a type of text editor, where he can write, put images and links, all the post structure.</text:p>
        </text:list-item>
        <text:list-item>
          <text:p text:style-name="P5">He should have a profile section, where he can see all his posts.</text:p>
        </text:list-item>
        <text:list-item>
          <text:p text:style-name="P5">He should be able to click on posts, and as the owner, see the metrics, such as visualizations, likes, sharings and comments.</text:p>
        </text:list-item>
        <text:list-item>
          <text:p text:style-name="P5">He should be able to edit posts.</text:p>
        </text:list-item>
        <text:list-item>
          <text:p text:style-name="P5">He should be able to delete.</text:p>
        </text:list-item>
        <text:list-item>
          <text:p text:style-name="P5">He should be able to like and respond to comments.</text:p>
        </text:list-item>
      </text:list>
      <text:p text:style-name="P4">Entities: User, Post, Comments</text:p>
      <text:p text:style-name="P4">Actions: UserManage, PostManage, Comment<text:span text:style-name="T1">s</text:span>Manage, MetricsManage.</text:p>
      <text:p text:style-name="P4"><text:span text:style-name="T2">PostContent</text:span>: content_id, post_id, content</text:p>
      <text:p text:style-name="P4"><text:span text:style-name="T2">PostMetrics</text:span>: metrics_id, likes_counter, comments_counter, sharings_counter, visualizations_counter, words_counter</text:p>
      <text:p text:style-name="P4"><text:span text:style-name="T2">Profile</text:span>: user_id, photo, description, tags, social_media_list</text:p>
      <text:p text:style-name="P4"><text:span text:style-name="T2">User</text:span>: user_id, name, e-mail, password, profile_id, <text:span text:style-name="T1">created_at</text:span></text:p>
      <text:p text:style-name="P4"><text:span text:style-name="T2">Post</text:span>: post_id, user_id, metrics_id, content_id, <text:span text:style-name="T1">visibility,</text:span> <text:span text:style-name="T1">created_at</text:span></text:p>
      <text:p text:style-name="P6"><text:span text:style-name="T2">PostComment</text:span>: comment_id, post_id, username, e-mail, comment.</text:p>
      <text:p text:style-name="P6"/>
      <text:p text:style-name="P6">Issue mal recortada nasce de modelo de dados mal pensado.</text:p>
      <text:p text:style-name="P6">1. Não sei chat o que me deu, pensei que seria bom usar o Post, como se fosse a sala da gerencia em uma empresa que tem o time de metrics <text:span text:style-name="T3">e os</text:span> criadores de posts. <text:span text:style-name="T3">Qual seria uma boa prática nesse caso? E também pensei em como os posts vão ser criados, tem alguma API que faz aquele estilo de text editor, como o libre office em um site, onde é possível colocar imagens, links, e estruturar o post?</text:span></text:p>
      <text:p text:style-name="P7">Exemplo 1:</text:p>
      <text:p text:style-name="P7">PostLike: like_id, post_id, user_id</text:p>
      <text:p text:style-name="P7"><text:soft-page-break/>PostComment: comment_id, post_id, user_id, comment.</text:p>
      <text:p text:style-name="P7">Post: post_id, user_id, content, visibility, created_at</text:p>
      <text:p text:style-name="P8"><text:span text:style-name="T2">Profile</text:span>: user_id, photo, description, tags, social_media_list</text:p>
      <text:p text:style-name="P8"><text:span text:style-name="T2">User</text:span>: user_id, name, e-mail, password, profile_id, <text:span text:style-name="T1">created_at</text:span></text:p>
      <text:p text:style-name="P7">2. Chat, pensei aqui, e não é necessário uma tabela PostMetrics, como você disse, as métricas são dados que variam constantemente, então ao invés de uma tabela, vai ter uma página que vai pegar os dados do banco e calcular as métricas a partir disso. Por exemplo likes, ela pode pegar o número de ocorrências do post.</text:p>
      <text:p text:style-name="P7"/>
      <text:p text:style-name="P7">3. Foi mal pensado da minha parte, estava pensando em colocar usuários anônimos, só que dessa forma perderia as funções de like, ou até mesmo de posts marcados como gostei no perfil do usuário. Então melhor fazer com conta de usuário mesmo.</text:p>
      <text:list text:style-name="List_20_1">
        <text:list-item>
          <text:p text:style-name="P9"><text:span text:style-name="T4">Modelagem de banco de dados relacional não segue hierarquia organizacional, segue </text:span><text:span text:style-name="T5">dependência de dados e frequência de mudança</text:span><text:span text:style-name="T6">. Então a analogia da sala de gerência não funciona.</text:span></text:p>
        </text:list-item>
        <text:list-item>
          <text:p text:style-name="P10">Dados que são calculados a partir de outros dados não merecem coluna própria – eles são query, não um estado. Já que dados são fatos atômicos precisam de linha própria. Então, a regra é, se o valor pode ser derivado de outra tabela com COUNT/SUM, não duplica ele como coluna.</text:p>
        </text:list-item>
      </text:list>
      <text:p text:style-name="P11">→ Rich Text Editor com conteúdo serializado em JSON ou HTML. “spike/pesquisa” – issue.</text:p>
      <text:p text:style-name="P11"/>
      <text:p text:style-name="P11"><text:span text:style-name="T7"/></text:p>
      <text:p text:style-name="P12">PostLike: like_id, post_id<text:span text:style-name="T8">(default)</text:span>, user_id, <text:span text:style-name="T4">comment_id</text:span><text:span text:style-name="T8">(default)</text:span></text:p>
      <text:p text:style-name="P12"/>
      <text:p text:style-name="P13">Profile(1) → (1)User : <text:span text:style-name="T8">OneToOne</text:span></text:p>
      <text:p text:style-name="P14">User(1) → (N)Post : <text:span text:style-name="T5">ForeignKey</text:span></text:p>
      <text:p text:style-name="P14">Post(1) → (N)Comment : <text:span text:style-name="T5">ForeignKey</text:span></text:p>
      <text:p text:style-name="P14">Post(1) → (N)Like : <text:span text:style-name="T5">ForeignKey</text:span></text:p>
      <text:p text:style-name="P14">Comment(1) → (N)Like : <text:span text:style-name="T5">ForeignKey</text:span></text:p>
      <text:p text:style-name="P13"/>
      <text:list text:continue-numbering="true" text:style-name="List_20_1">
        <text:list-item>
          <text:p text:style-name="P15"><text:span text:style-name="T9">DJANGO RELATIONSHIPS</text:span></text:p>
        </text:list-item>
      </text:list>
      <text:p text:style-name="P16">ForeignKey<text:span text:style-name="T7">: Many-to-One-Relationships: One Instance of the Model(the child) can be associated with multiple instances of another model (parent). It creates a database column to store the primary key of the related model.</text:span></text:p>
      <text:p text:style-name="P17">Author (can have multilples books), a Book(can have only one author) → <text:span text:style-name="T8">The book will be the one to use the Author foreign key, because he is the child. <text:s/>It should use the on_delete=models.CASCADE.</text:span></text:p>
      <text:p text:style-name="P18"><text:soft-page-break/>One-to-One Relationships<text:span text:style-name="T7">: Each instance of a model is related to exactaly one instance of another model. It also create a databse column to store the primary key of the related model.</text:span></text:p>
      <text:p text:style-name="P19">A UserProfile is linked to exactly one Person, and vice-versa. The UserProfile will be the one to store the OneToOneField, it should use the on_delete=models.CASCADE.</text:p>
      <text:list text:continue-numbering="true" text:style-name="List_20_1">
        <text:list-item>
          <text:p text:style-name="P20">FK nullable / pollymorphic association</text:p>
          <text:p text:style-name="P21">It´s what is happening in the PostLike table: </text:p>
        </text:list-item>
      </text:list>
      <text:p text:style-name="P22">PostLike: like_id, post_id<text:span text:style-name="T8">(default)</text:span>, user_id, <text:span text:style-name="T4">comment_id</text:span><text:span text:style-name="T8">(default)</text:span></text:p>
      <text:p text:style-name="P23">The question that made me think of this table was: “How can you make the comment like, without duplicating this table?”. And for me, inexperienced with data modeling, thinked that, oh that´s easy, I can just put the comment_id here, and when the user likes a post and comment it goes to the same table, BUT, it´s not that easy. Because each time that the user likes a post, what will go into de comment_id field and vice-versa, there´s also another detail, how the likes and comments will be calculated if they are not separated ? For the first problem, I thought that puting them as default would be a solution, thats when the <text:span text:style-name="T2">FK nullable/Pollymorphic association</text:span> came to me.</text:p>
      <text:p text:style-name="P23">That also generates another question, how can I garantee that on our aplication/database, a line with post_id and comment_id will never come to exist? An the opposite, a line with both of them null?</text:p>
      <text:p text:style-name="P23">→ “generic foreign key” – ContentType Django</text:p>
      <text:p text:style-name="P11">→ <text:span text:style-name="T10">Or simply two separated tables: PostLike and CommentLike</text:span></text:p>
      <text:p text:style-name="P11"/>
      <text:list text:continue-numbering="true" text:style-name="List_20_1">
        <text:list-item>
          <text:p text:style-name="P24">What is generic foreign key in Django?</text:p>
        </text:list-item>
      </text:list>
      <text:p text:style-name="P25">ContentType:<text:span text:style-name="T7"> content_types provide a way to create generic relationships between models. They let you connect a model to any other model without explicitly defining a ForeignKey for each possible relationship. Suppose e have two models: Posts, Comments and Likes. Posts and Comments both should be linked to Likes model. What will we do now?</text:span></text:p>
      <text:p text:style-name="P26">Two sepa<text:span text:style-name="T11">rated </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8T09:27:39.666206400</meta:creation-date>
    <dc:date>2026-06-18T15:53:32.524080500</dc:date>
    <meta:editing-duration>PT4H50M48S</meta:editing-duration>
    <meta:editing-cycles>1</meta:editing-cycles>
    <meta:generator>LibreOffice/26.2.1.2$Windows_X86_64 LibreOffice_project/620$Build-2</meta:generator>
    <meta:document-statistic meta:table-count="0" meta:image-count="0" meta:object-count="0" meta:page-count="3" meta:paragraph-count="54" meta:word-count="875" meta:character-count="5408" meta:non-whitespace-character-count="4594"/>
  </office:meta>
</office:document-meta>
</file>